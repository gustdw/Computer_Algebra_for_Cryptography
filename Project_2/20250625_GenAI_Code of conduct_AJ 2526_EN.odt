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6.995cm" fo:margin-left="0.009cm" fo:margin-top="0cm" fo:margin-bottom="0cm" table:align="left" style:writing-mode="lr-tb"/>
    </style:style>
    <style:style style:name="Table1.A" style:family="table-column">
      <style:table-column-properties style:column-width="6.241cm"/>
    </style:style>
    <style:style style:name="Table1.B" style:family="table-column">
      <style:table-column-properties style:column-width="9.802cm"/>
    </style:style>
    <style:style style:name="Table1.C" style:family="table-column">
      <style:table-column-properties style:column-width="10.952cm"/>
    </style:style>
    <style:style style:name="Table1.1" style:family="table-row">
      <style:table-row-properties fo:keep-together="auto"/>
    </style:style>
    <style:style style:name="Table1.A1" style:family="table-cell">
      <style:table-cell-properties style:vertical-align="bottom" fo:padding-left="0.191cm" fo:padding-right="0.191cm" fo:padding-top="0cm" fo:padding-bottom="0cm" fo:border="0.5pt solid #000000" style:writing-mode="lr-tb"/>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A12" style:family="table-cell">
      <style:table-cell-properties fo:padding-left="0.191cm" fo:padding-right="0.191cm" fo:padding-top="0cm" fo:padding-bottom="0cm" fo:border="0.5pt solid #000000" style:writing-mode="lr-tb"/>
    </style:style>
    <style:style style:name="Table1.B12" style:family="table-cell">
      <style:table-cell-properties fo:padding-left="0.191cm" fo:padding-right="0.191cm" fo:padding-top="0cm" fo:padding-bottom="0cm" fo:border="0.5pt solid #000000" style:writing-mode="lr-tb"/>
    </style:style>
    <style:style style:name="Table1.C12" style:family="table-cell">
      <style:table-cell-properties fo:padding-left="0.191cm" fo:padding-right="0.191cm" fo:padding-top="0cm" fo:padding-bottom="0cm" fo:border="0.5pt solid #000000" style:writing-mode="lr-tb"/>
    </style:style>
    <style:style style:name="Table1.A13" style:family="table-cell">
      <style:table-cell-properties fo:padding-left="0.191cm" fo:padding-right="0.191cm" fo:padding-top="0cm" fo:padding-bottom="0cm" fo:border="0.5pt solid #000000" style:writing-mode="lr-tb"/>
    </style:style>
    <style:style style:name="Table1.B13" style:family="table-cell">
      <style:table-cell-properties fo:padding-left="0.191cm" fo:padding-right="0.191cm" fo:padding-top="0cm" fo:padding-bottom="0cm" fo:border="0.5pt solid #000000" style:writing-mode="lr-tb"/>
    </style:style>
    <style:style style:name="Table1.C13"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style:tab-stops>
          <style:tab-stop style:position="4.001cm"/>
          <style:tab-stop style:position="15.503cm" style:leader-style="dotted" style:leader-text="."/>
        </style:tab-stops>
      </style:paragraph-properties>
    </style:style>
    <style:style style:name="P2" style:family="paragraph" style:parent-style-name="Standard">
      <style:paragraph-properties fo:margin-top="0cm" fo:margin-bottom="0cm" style:contextual-spacing="false" fo:line-height="100%">
        <style:tab-stops>
          <style:tab-stop style:position="4.001cm"/>
          <style:tab-stop style:position="15.503cm" style:leader-style="dotted" style:leader-text="."/>
        </style:tab-stops>
      </style:paragraph-properties>
      <style:text-properties style:font-name="Calibri1" fo:language="en" fo:country="GB" fo:font-style="italic" style:font-style-asian="italic" style:font-name-complex="Calibri2" style:font-style-complex="italic"/>
    </style:style>
    <style:style style:name="P3" style:family="paragraph" style:parent-style-name="Standard" style:list-style-name="WWNum1">
      <style:paragraph-properties fo:margin-left="0.635cm" fo:margin-top="0.106cm" fo:margin-bottom="0.106cm" style:contextual-spacing="false" fo:line-height="100%" fo:hyphenation-ladder-count="no-limit" fo:hyphenation-keep="auto" loext:hyphenation-keep-type="column" loext:hyphenation-keep-line="false" fo:text-indent="-0.63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list-style-name="WWNum1">
      <style:paragraph-properties fo:margin-left="0.63cm" fo:margin-top="0.106cm" fo:margin-bottom="0.106cm" style:contextual-spacing="false" fo:line-height="100%" fo:hyphenation-ladder-count="no-limit" fo:hyphenation-keep="auto" loext:hyphenation-keep-type="column" loext:hyphenation-keep-line="false" fo:text-indent="-0.63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4.501cm" fo:margin-top="0.106cm" fo:margin-bottom="0.106cm" style:contextual-spacing="false" fo:line-height="100%" fo:hyphenation-ladder-count="no-limit" fo:hyphenation-keep="auto" loext:hyphenation-keep-type="column" loext:hyphenation-keep-line="false" style:vertical-align="baseline"/>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list-style-name="WWNum1">
      <style:paragraph-properties fo:margin-top="0.106cm" fo:margin-bottom="0.106cm" style:contextual-spacing="false" fo:line-height="100%" fo:hyphenation-ladder-count="no-limit" fo:hyphenation-keep="auto" loext:hyphenation-keep-type="column" loext:hyphenation-keep-line="false" style:vertical-align="baselin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106cm" fo:margin-bottom="0.106cm" style:contextual-spacing="false" fo:line-height="100%" fo:hyphenation-ladder-count="no-limit" fo:hyphenation-keep="auto" loext:hyphenation-keep-type="column" loext:hyphenation-keep-line="false" style:vertical-align="baseline"/>
      <style:text-properties style:font-name="Calibri1" fo:language="en" fo:country="GB" style:font-name-complex="Calibri2" fo:hyphenate="false" fo:hyphenation-remain-char-count="2" fo:hyphenation-push-char-count="2" loext:hyphenation-no-caps="false" loext:hyphenation-no-last-word="false" loext:hyphenation-word-char-count="5" loext:hyphenation-zone="no-limit"/>
    </style:style>
    <style:style style:name="P8" style:family="paragraph" style:parent-style-name="Standard">
      <loext:graphic-properties draw:fill="solid" draw:fill-color="#ffffff"/>
      <style:paragraph-properties fo:margin-top="0.318cm" fo:margin-bottom="0.318cm" style:contextual-spacing="false" fo:line-height="100%" fo:text-align="justify" style:justify-single-word="false" fo:background-color="#ffffff" loext:word-spacing-minimum="75%" loext:word-spacing-maximum="133%"/>
    </style:style>
    <style:style style:name="P9" style:family="paragraph" style:parent-style-name="Standard">
      <style:paragraph-properties fo:margin-top="0cm" fo:margin-bottom="0cm" style:contextual-spacing="false" fo:line-height="100%" fo:break-before="page">
        <style:tab-stops>
          <style:tab-stop style:position="4.001cm"/>
          <style:tab-stop style:position="15.503cm" style:leader-style="dotted" style:leader-text="."/>
        </style:tab-stops>
      </style:paragraph-properties>
      <style:text-properties style:font-name="Calibri1" fo:language="en" fo:country="GB" fo:font-style="italic" style:font-style-asian="italic" style:font-name-complex="Calibri2" style:font-style-complex="italic"/>
    </style:style>
    <style:style style:name="P10" style:family="paragraph" style:parent-style-name="Standard">
      <style:paragraph-properties fo:margin-top="0cm" fo:margin-bottom="0cm" style:contextual-spacing="false" fo:line-height="200%">
        <style:tab-stops>
          <style:tab-stop style:position="4.001cm"/>
          <style:tab-stop style:position="15.503cm" style:leader-style="dotted" style:leader-text="."/>
        </style:tab-stops>
      </style:paragraph-properties>
    </style:style>
    <style:style style:name="P11" style:family="paragraph" style:parent-style-name="Standard">
      <loext:graphic-properties draw:fill="solid" draw:fill-color="#d9d9d9"/>
      <style:paragraph-properties fo:margin-top="0.176cm" fo:margin-bottom="0.176cm" style:contextual-spacing="false" fo:line-height="100%" fo:hyphenation-ladder-count="no-limit" fo:hyphenation-keep="auto" loext:hyphenation-keep-type="column" loext:hyphenation-keep-line="false" fo:background-color="#d9d9d9"/>
      <style:text-properties style:font-name="Calibri1" fo:language="en" fo:country="GB" fo:font-weight="bold" style:font-name-asian="Times New Roman1" style:language-asian="nl" style:country-asian="BE" style:font-weight-asian="bold" style:font-name-complex="Calibri2" style:font-weight-complex="bold"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loext:graphic-properties draw:fill="solid" draw:fill-color="#d9d9d9"/>
      <style:paragraph-properties fo:margin-top="0.176cm" fo:margin-bottom="0.176cm" style:contextual-spacing="false" fo:line-height="100%" fo:hyphenation-ladder-count="no-limit" fo:hyphenation-keep="auto" loext:hyphenation-keep-type="column" loext:hyphenation-keep-line="false" fo:background-color="#d9d9d9"/>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176cm" fo:margin-bottom="0.176cm" style:contextual-spacing="false" fo:line-height="100%" fo:hyphenation-ladder-count="no-limit" fo:hyphenation-keep="auto" loext:hyphenation-keep-type="column" loext:hyphenation-keep-line="false"/>
      <style:text-properties style:font-name="Calibri1" fo:language="en" fo:country="GB" style:font-name-asian="Times New Roman1" style:language-asian="nl" style:country-asian="BE" style:font-name-complex="Calibri2"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176cm" fo:margin-bottom="0.176cm" style:contextual-spacing="false" fo:line-height="200%"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176cm" fo:margin-bottom="0.176cm" style:contextual-spacing="false" fo:line-height="200%" fo:hyphenation-ladder-count="no-limit" fo:hyphenation-keep="auto" loext:hyphenation-keep-type="column" loext:hyphenation-keep-line="false">
        <style:tab-stops>
          <style:tab-stop style:position="1cm"/>
          <style:tab-stop style:position="4.001cm"/>
          <style:tab-stop style:position="12.002cm"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left="1cm" fo:margin-top="0.176cm" fo:margin-bottom="0.176cm" style:contextual-spacing="false" fo:line-height="200%" fo:hyphenation-ladder-count="no-limit" fo:hyphenation-keep="auto" loext:hyphenation-keep-type="column" loext:hyphenation-keep-line="false">
        <style:tab-stops>
          <style:tab-stop style:position="1cm"/>
          <style:tab-stop style:position="4.001cm"/>
          <style:tab-stop style:position="15.503cm"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176cm" fo:margin-bottom="0.176cm" style:contextual-spacing="false" fo:line-height="200%" fo:hyphenation-ladder-count="no-limit" fo:hyphenation-keep="auto" loext:hyphenation-keep-type="column" loext:hyphenation-keep-line="false">
        <style:tab-stops>
          <style:tab-stop style:position="1cm"/>
          <style:tab-stop style:position="4.001cm"/>
          <style:tab-stop style:position="15.503cm"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text-properties style:font-name="Calibri1" fo:language="en" fo:country="GB" style:font-name-asian="Times New Roman1" style:language-asian="nl" style:country-asian="BE" style:font-name-complex="Calibri2"/>
    </style:style>
    <style:style style:name="P19" style:family="paragraph" style:parent-style-name="Standard">
      <style:paragraph-properties fo:margin-top="0cm" fo:margin-bottom="0.176cm" style:contextual-spacing="false" fo:line-height="200%" fo:hyphenation-ladder-count="no-limit" fo:hyphenation-keep="auto" loext:hyphenation-keep-type="column" loext:hyphenation-keep-line="false" fo:break-before="page"/>
      <style:text-properties style:font-name="Calibri1" fo:language="en" fo:country="GB" style:font-name-asian="Times New Roman1" style:language-asian="nl" style:country-asian="BE" style:font-name-complex="Calibri2"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176cm" fo:margin-bottom="0.176cm" style:contextual-spacing="false" fo:line-height="2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176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en" fo:country="GB" fo:font-weight="bold" style:letter-kerning="false" style:font-name-asian="Times New Roman1" style:font-size-asian="11pt" style:language-asian="nl" style:country-asian="BE"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200%" fo:text-align="start" style:justify-single-word="false" fo:orphans="2" fo:widows="2" fo:hyphenation-ladder-count="no-limit" fo:hyphenation-keep="auto" loext:hyphenation-keep-type="column" loext:hyphenation-keep-line="false"/>
      <style:text-properties style:font-name="Calibri1" fo:font-size="11pt" fo:language="en" fo:country="GB"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line-height="200%" fo:text-align="start" style:justify-single-word="false" fo:orphans="2" fo:widows="2" fo:hyphenation-ladder-count="no-limit" fo:hyphenation-keep="auto" loext:hyphenation-keep-type="column" loext:hyphenation-keep-line="false"/>
      <style:text-properties style:font-name="Calibri1" fo:font-size="11pt" fo:language="en" fo:country="GB" officeooo:rsid="000f6b5b" officeooo:paragraph-rsid="000f6b5b"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List_20_Paragraph" style:list-style-name="WWNum10">
      <style:paragraph-properties fo:margin-top="0cm" fo:margin-bottom="0cm" style:contextual-spacing="true" fo:line-height="1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style:style>
    <style:style style:name="P28"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style:style>
    <style:style style:name="P29" style:family="paragraph" style:parent-style-name="Standard">
      <style:paragraph-properties fo:margin-left="0.635cm" fo:margin-top="0cm" fo:margin-bottom="0cm" style:contextual-spacing="false" fo:line-height="100%" fo:text-align="start" style:justify-single-word="false" fo:orphans="2" fo:widows="2"/>
      <style:text-properties style:font-name="Calibri1" fo:font-size="11pt" fo:language="en" fo:country="US" style:letter-kerning="false" style:font-name-asian="Times New Roman1" style:font-size-asian="11pt" style:language-asian="nl" style:country-asian="BE" style:font-name-complex="Calibri2"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en" fo:country="US"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176cm" fo:margin-bottom="0.176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2" style:family="paragraph" style:parent-style-name="List_20_Paragraph" style:list-style-name="WWNum10">
      <style:paragraph-properties fo:margin-top="0cm" fo:margin-bottom="0cm" style:contextual-spacing="true" fo:line-height="100%" fo:text-align="start" style:justify-single-word="false" fo:orphans="2" fo:widows="2" fo:hyphenation-ladder-count="no-limit" fo:hyphenation-keep="auto" loext:hyphenation-keep-type="column" loext:hyphenation-keep-line="false"/>
      <style:text-properties style:font-name="Calibri"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false" fo:line-height="200%" fo:text-align="start" style:justify-single-word="false" fo:orphans="2" fo:widows="2" fo:hyphenation-ladder-count="no-limit" fo:hyphenation-keep="auto" loext:hyphenation-keep-type="column" loext:hyphenation-keep-line="false"/>
      <style:text-properties style:font-name="Calibri1" fo:font-size="11pt" fo:language="en" fo:country="GB" officeooo:rsid="0012666a" officeooo:paragraph-rsid="0012666a"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Calibri"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5" style:family="paragraph" style:parent-style-name="List_20_Paragraph" style:list-style-name="WWNum10">
      <style:paragraph-properties fo:margin-top="0cm" fo:margin-bottom="0cm" style:contextual-spacing="true" fo:line-height="100%" fo:text-align="start" style:justify-single-word="false" fo:orphans="2" fo:widows="2" fo:hyphenation-ladder-count="no-limit" fo:hyphenation-keep="auto" loext:hyphenation-keep-type="column" loext:hyphenation-keep-line="false"/>
      <style:text-properties style:font-name="Calibri1" fo:font-size="11pt" fo:language="en" fo:country="GB"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false" fo:line-height="200%" fo:text-align="start" style:justify-single-word="false" fo:orphans="2" fo:widows="2" fo:hyphenation-ladder-count="no-limit" fo:hyphenation-keep="auto" loext:hyphenation-keep-type="column" loext:hyphenation-keep-line="false"/>
      <style:text-properties style:font-name="Calibri1" fo:font-size="11pt" fo:language="en" fo:country="GB" officeooo:rsid="001543f1" officeooo:paragraph-rsid="001543f1"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1" fo:font-size="14pt" fo:language="en" fo:country="GB" fo:font-style="italic" style:font-size-asian="14pt" style:font-style-asian="italic" style:font-name-complex="Calibri2" style:font-size-complex="14pt" style:font-style-complex="italic"/>
    </style:style>
    <style:style style:name="T2" style:family="text">
      <style:text-properties style:font-name="Calibri1" fo:font-size="14pt" fo:language="en" fo:country="GB" style:text-underline-style="solid" style:text-underline-width="auto" style:text-underline-color="font-color" fo:font-weight="bold" style:font-size-asian="14pt" style:font-weight-asian="bold" style:font-name-complex="Calibri2" style:font-size-complex="14pt" style:font-weight-complex="bold"/>
    </style:style>
    <style:style style:name="T3" style:family="text">
      <style:text-properties fo:font-size="14pt" fo:language="en" fo:country="GB" style:font-size-asian="14pt" style:font-size-complex="14pt"/>
    </style:style>
    <style:style style:name="T4" style:family="text">
      <style:text-properties style:font-name="Calibri1" fo:language="en" fo:country="GB" fo:font-style="italic" style:font-style-asian="italic" style:font-name-complex="Calibri2" style:font-style-complex="italic"/>
    </style:style>
    <style:style style:name="T5" style:family="text">
      <style:text-properties style:font-name="Calibri1" fo:font-style="italic" style:font-style-asian="italic" style:font-name-complex="Calibri2" style:font-style-complex="italic"/>
    </style:style>
    <style:style style:name="T6" style:family="text">
      <style:text-properties style:font-name="Calibri1" fo:font-size="12pt" fo:language="en" fo:country="GB" fo:font-weight="bold" style:font-size-asian="12pt" style:font-weight-asian="bold" style:font-name-complex="Calibri2" style:font-size-complex="12pt" style:font-weight-complex="bold"/>
    </style:style>
    <style:style style:name="T7" style:family="text">
      <style:text-properties style:font-name="Calibri1" fo:font-size="12pt" fo:language="en" fo:country="GB" fo:font-style="italic" fo:font-weight="bold" style:font-size-asian="12pt" style:font-style-asian="italic" style:font-weight-asian="bold" style:font-name-complex="Calibri2" style:font-size-complex="12pt" style:font-style-complex="italic" style:font-weight-complex="bold"/>
    </style:style>
    <style:style style:name="T8" style:family="text">
      <style:text-properties style:font-name="Calibri1" fo:language="en" fo:country="GB" style:font-name-complex="Calibri2"/>
    </style:style>
    <style:style style:name="T9" style:family="text">
      <style:text-properties style:font-name="Calibri1" fo:language="en" fo:country="GB" fo:font-weight="bold" style:font-weight-asian="bold" style:font-name-complex="Calibri2" style:font-weight-complex="bold"/>
    </style:style>
    <style:style style:name="T10" style:family="text">
      <style:text-properties style:font-name="Calibri1" fo:language="en" fo:country="US" style:font-name-complex="Calibri2"/>
    </style:style>
    <style:style style:name="T11" style:family="text">
      <style:text-properties style:font-name="Calibri1" fo:language="en" fo:country="US" fo:font-weight="bold" style:font-weight-asian="bold" style:font-name-complex="Calibri2" style:font-weight-complex="bold"/>
    </style:style>
    <style:style style:name="T12" style:family="text">
      <style:text-properties fo:language="en" fo:country="US"/>
    </style:style>
    <style:style style:name="T13" style:family="text">
      <style:text-properties style:font-name="Calibri1" fo:font-weight="bold" style:font-weight-asian="bold" style:font-name-complex="Calibri2" style:font-weight-complex="bold"/>
    </style:style>
    <style:style style:name="T14" style:family="text">
      <style:text-properties style:font-name="Calibri1" fo:language="en" fo:country="GB" style:font-name-complex="Calibri2" style:font-weight-complex="bold"/>
    </style:style>
    <style:style style:name="T15" style:family="text">
      <style:text-properties style:font-name="Calibri1" fo:language="en" fo:country="US" style:font-name-complex="Calibri2" style:font-weight-complex="bold"/>
    </style:style>
    <style:style style:name="T16" style:family="text">
      <style:text-properties style:font-name="Calibri1" style:font-name-complex="Calibri2" style:font-weight-complex="bold"/>
    </style:style>
    <style:style style:name="T17" style:family="text">
      <style:text-properties style:font-name="Calibri1" fo:language="en" fo:country="GB" fo:font-weight="bold" style:font-weight-asian="bold" style:font-name-complex="Calibri2"/>
    </style:style>
    <style:style style:name="T18" style:family="text">
      <style:text-properties style:font-name="Calibri1" style:font-name-complex="Calibri2"/>
    </style:style>
    <style:style style:name="T19" style:family="text">
      <style:text-properties style:font-name="Calibri1" fo:language="en" fo:country="GB" style:font-name-asian="Times New Roman1" style:language-asian="nl" style:country-asian="BE" style:font-name-complex="Calibri2"/>
    </style:style>
    <style:style style:name="T20" style:family="text">
      <style:text-properties style:font-name="Calibri1" fo:language="en" fo:country="GB" fo:font-style="italic" fo:font-weight="bold" style:font-style-asian="italic" style:font-weight-asian="bold" style:font-name-complex="Calibri2" style:font-style-complex="italic"/>
    </style:style>
    <style:style style:name="T21" style:family="text">
      <style:text-properties style:use-window-font-color="true" loext:opacity="0%" style:font-name="Calibri1" fo:language="en" fo:country="GB" style:text-underline-style="none" style:font-name-complex="Calibri2" style:font-weight-complex="bold"/>
    </style:style>
    <style:style style:name="T22" style:family="text">
      <style:text-properties style:use-window-font-color="true" loext:opacity="0%" style:font-name="Calibri1" fo:language="en" fo:country="GB" style:font-name-complex="Calibri2" style:font-weight-complex="bold"/>
    </style:style>
    <style:style style:name="T23" style:family="text">
      <style:text-properties style:font-name="Calibri1" fo:language="en" fo:country="GB" style:font-name-asian="Calibri2" style:font-name-complex="Calibri2"/>
    </style:style>
    <style:style style:name="T24" style:family="text">
      <style:text-properties fo:color="#505050" loext:opacity="100%" fo:font-size="12pt" fo:language="en" fo:country="GB" style:font-name-asian="Times New Roman1" style:font-size-asian="12pt" style:language-asian="sv" style:country-asian="SE" style:font-name-complex="Calibri2" style:font-size-complex="12pt"/>
    </style:style>
    <style:style style:name="T25" style:family="text">
      <style:text-properties fo:color="#505050" loext:opacity="100%" fo:font-size="12pt" fo:language="en" fo:country="GB" fo:font-weight="bold" style:font-name-asian="Times New Roman1" style:font-size-asian="12pt" style:language-asian="sv" style:country-asian="SE" style:font-weight-asian="bold" style:font-name-complex="Calibri2" style:font-size-complex="12pt" style:font-weight-complex="bold"/>
    </style:style>
    <style:style style:name="T26" style:family="text">
      <style:text-properties fo:color="#505050" loext:opacity="100%" fo:language="en" fo:country="GB" fo:font-weight="bold" style:font-name-asian="Times New Roman1" style:language-asian="sv" style:country-asian="SE" style:font-weight-asian="bold" style:font-weight-complex="bold"/>
    </style:style>
    <style:style style:name="T27" style:family="text">
      <style:text-properties fo:color="#505050" loext:opacity="100%" fo:language="en" fo:country="GB" style:font-name-asian="Times New Roman1" style:language-asian="sv" style:country-asian="SE" style:font-name-complex="Calibri2"/>
    </style:style>
    <style:style style:name="T28" style:family="text">
      <style:text-properties fo:color="#505050" loext:opacity="100%" fo:language="en" fo:country="US" style:font-name-asian="Times New Roman1" style:language-asian="sv" style:country-asian="SE" style:font-name-complex="Calibri2"/>
    </style:style>
    <style:style style:name="T29" style:family="text">
      <style:text-properties fo:color="#505050" loext:opacity="100%" style:font-name-asian="Times New Roman1" style:language-asian="sv" style:country-asian="SE" style:font-name-complex="Calibri2"/>
    </style:style>
    <style:style style:name="T30" style:family="text">
      <style:text-properties fo:language="en" fo:country="GB"/>
    </style:style>
    <style:style style:name="T31" style:family="text">
      <style:text-properties fo:language="en" fo:country="US" officeooo:rsid="000f6b5b"/>
    </style:style>
    <style:style style:name="T32" style:family="text">
      <style:text-properties style:font-name="Calibri1" fo:language="en" fo:country="US" fo:font-weight="bold" officeooo:rsid="000f6b5b" style:font-weight-asian="bold" style:font-name-complex="Calibri2" style:font-weight-complex="bold"/>
    </style:style>
    <style:style style:name="T33" style:family="text">
      <style:text-properties style:font-name="Calibri1" fo:language="en" fo:country="GB" fo:font-weight="bold" style:font-name-asian="Times New Roman1" style:language-asian="nl" style:country-asian="BE" style:font-weight-asian="bold" style:font-name-complex="Calibri2" style:font-weight-complex="bold"/>
    </style:style>
    <style:style style:name="T34" style:family="text">
      <style:text-properties style:font-name="Calibri1" fo:font-size="12pt" fo:language="en" fo:country="GB" fo:font-weight="bold" style:font-name-asian="Times New Roman1" style:font-size-asian="12pt" style:language-asian="nl" style:country-asian="BE" style:font-weight-asian="bold" style:font-name-complex="Calibri2" style:font-size-complex="12pt" style:font-weight-complex="bold"/>
    </style:style>
    <style:style style:name="T35" style:family="text">
      <style:text-properties style:font-name="Calibri1" fo:language="en" fo:country="GB" officeooo:rsid="000fb1a8" style:font-name-asian="Times New Roman1" style:language-asian="nl" style:country-asian="BE" style:font-name-complex="Calibri2"/>
    </style:style>
    <style:style style:name="T36" style:family="text">
      <style:text-properties style:font-name="Calibri1" fo:language="en" fo:country="GB" fo:font-weight="bold" style:font-name-asian="Times New Roman1" style:language-asian="nl" style:country-asian="BE" style:font-weight-asian="bold" style:font-name-complex="Calibri2"/>
    </style:style>
    <style:style style:name="T37" style:family="text">
      <style:text-properties style:font-name="Calibri1" fo:language="en" fo:country="GB" officeooo:rsid="000f6b5b" style:font-name-asian="Times New Roman1" style:language-asian="nl" style:country-asian="BE" style:font-name-complex="Calibri2"/>
    </style:style>
    <style:style style:name="T38" style:family="text">
      <style:text-properties style:font-name="Calibri1" fo:language="en" fo:country="US" style:font-name-asian="Times New Roman1" style:language-asian="nl" style:country-asian="BE" style:font-name-complex="Calibri2"/>
    </style:style>
    <style:style style:name="T39" style:family="text">
      <style:text-properties style:font-name="Calibri1" fo:language="en" fo:country="US" fo:font-weight="bold" style:font-name-asian="Times New Roman1" style:language-asian="nl" style:country-asian="BE" style:font-weight-asian="bold" style:font-name-complex="Calibri2" style:font-weight-complex="bold"/>
    </style:style>
    <style:style style:name="T40" style:family="text">
      <style:text-properties style:font-name="Times New Roman" fo:font-size="12pt" fo:language="en" fo:country="GB" style:font-name-asian="Times New Roman1" style:font-size-asian="12pt" style:language-asian="nl" style:country-asian="BE" style:font-name-complex="Times New Roman1" style:font-size-complex="12pt"/>
    </style:style>
    <style:style style:name="T41" style:family="text">
      <style:text-properties style:font-name="Calibri1" fo:language="en" fo:country="GB" officeooo:rsid="00107b4a" style:font-name-asian="Times New Roman1" style:language-asian="nl" style:country-asian="BE" style:font-name-complex="Calibri2"/>
    </style:style>
    <style:style style:name="T42" style:family="text">
      <style:text-properties fo:language="en" fo:country="GB" fo:font-weight="bold" style:font-name-asian="Times New Roman1" style:language-asian="nl" style:country-asian="BE" style:font-weight-asian="bold" style:font-name-complex="Calibri2" style:font-weight-complex="bold"/>
    </style:style>
    <style:style style:name="T43" style:family="text">
      <style:text-properties fo:language="en" fo:country="GB" style:font-name-asian="Times New Roman1" style:language-asian="nl" style:country-asian="BE" style:font-name-complex="Calibri2"/>
    </style:style>
    <style:style style:name="T44" style:family="text">
      <style:text-properties fo:language="en" fo:country="GB" fo:font-style="italic" style:font-name-asian="Times New Roman1" style:language-asian="nl" style:country-asian="BE" style:font-style-asian="italic" style:font-name-complex="Calibri2" style:font-style-complex="italic"/>
    </style:style>
    <style:style style:name="T45" style:family="text">
      <style:text-properties fo:language="en" fo:country="US" fo:font-weight="bold" style:font-name-asian="Times New Roman1" style:language-asian="nl" style:country-asian="BE" style:font-weight-asian="bold" style:font-name-complex="Calibri2" style:font-weight-complex="bold"/>
    </style:style>
    <style:style style:name="T46" style:family="text">
      <style:text-properties officeooo:rsid="0012666a"/>
    </style:style>
    <style:style style:name="T47" style:family="text">
      <style:text-properties officeooo:rsid="0011d9da"/>
    </style:style>
    <style:style style:name="T48" style:family="text">
      <style:text-properties fo:language="en" fo:country="US" style:font-name-asian="Times New Roman1" style:language-asian="nl" style:country-asian="BE" style:font-name-complex="Calibri2"/>
    </style:style>
    <style:style style:name="T49" style:family="text">
      <style:text-properties fo:language="en" fo:country="GB" fo:font-weight="bold" style:font-name-asian="Times New Roman1" style:language-asian="nl" style:country-asian="BE" style:font-weight-asian="bold" style:font-name-complex="Calibri2"/>
    </style:style>
    <style:style style:name="T50" style:family="text">
      <style:text-properties officeooo:rsid="001223de"/>
    </style:style>
    <style:style style:name="T51" style:family="text">
      <style:text-properties style:font-name="Times New Roman" fo:font-size="12pt" fo:language="en" fo:country="GB" fo:font-weight="bold" style:font-name-asian="Times New Roman1" style:font-size-asian="12pt" style:language-asian="nl" style:country-asian="BE" style:font-weight-asian="bold" style:font-name-complex="Times New Roman1" style:font-size-complex="12pt" style:font-weight-complex="bold"/>
    </style:style>
    <style:style style:name="T52" style:family="text">
      <style:text-properties style:font-name="Times New Roman" fo:font-size="12pt" fo:language="en" fo:country="US" style:font-name-asian="Times New Roman1" style:font-size-asian="12pt" style:language-asian="nl" style:country-asian="BE" style:font-name-complex="Times New Roman1" style:font-size-complex="12pt"/>
    </style:style>
    <style:style style:name="T53" style:family="text">
      <style:text-properties fo:language="en" fo:country="US" style:font-name-asian="Times New Roman1" style:language-asian="nl" style:country-asian="BE"/>
    </style:style>
    <style:style style:name="T54" style:family="text">
      <style:text-properties officeooo:rsid="0013e00f"/>
    </style:style>
    <style:style style:name="T55" style:family="text">
      <style:text-properties fo:language="en" fo:country="US" fo:font-weight="bold" style:font-weight-asian="bold" style:font-weight-complex="bold"/>
    </style:style>
    <style:style style:name="T56" style:family="text">
      <style:text-properties style:font-name="Calibri1" fo:font-weight="bold" style:font-name-asian="Times New Roman1" style:language-asian="nl" style:country-asian="BE" style:font-weight-asian="bold" style:font-name-complex="Calibri2" style:font-weight-complex="bold"/>
    </style:style>
    <style:style style:name="T57" style:family="text">
      <style:text-properties fo:font-weight="bold" style:font-name-asian="Times New Roman1" style:language-asian="nl" style:country-asian="BE" style:font-weight-asian="bold" style:font-name-complex="Calibri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133403818"/><text:span text:style-name="T2">Code of conduct and transparency statement on the use of GenAI <text:s/>for KU Leuven-students (academic year 2025-2026)</text:span><text:span text:style-name="T3"><text:line-break/></text:span></text:p>
      <text:p text:style-name="P1" loext:marker-style-name="T4"><text:span text:style-name="T5">Generative AI (GenAI) assistance tools can be used to generate various types of content, including text, images, code, video, music, or combinations thereof. Common examples of such tools include ChatGPT, Google Gemini, Microsoft Copilot, Midjourney, Claude.ai, Perplexity.ai, and DALL·E, among others.</text:span><text:span text:style-name="T4"/></text:p>
      <text:p text:style-name="P2" loext:marker-style-name="T4"/>
      <text:p text:style-name="P1" loext:marker-style-name="T4"><text:span text:style-name="T4">This code of conduct is a tool that helps students to be transparent about the use of GenAI and fits within the university’s principles on academic integrity.</text:span><text:span text:style-name="T4"/></text:p>
      <text:p text:style-name="P2" loext:marker-style-name="T4"/>
      <text:p text:style-name="P1" loext:marker-style-name="T4"><text:span text:style-name="T6">Important guidelines and remarks</text:span><text:span text:style-name="T7"/></text:p>
      <text:list text:style-name="WWNum1">
        <text:list-item>
          <text:p text:style-name="P3" loext:marker-style-name="T8"><text:span text:style-name="T9">Sensitive or personal data: </text:span><text:span text:style-name="T10">Some GenAI tools protect your input and sensitive or personal data better than others. There is often no transparency on what the owners of the AI applications do with the data entered.</text:span><text:span text:style-name="T11"> </text:span><text:span text:style-name="T10">Therefore, </text:span><text:span text:style-name="T11">do not enter sensitive or personal data in free GenAI tools. </text:span><text:span text:style-name="T10">More info about what sensitive and personal data are, is described in</text:span><text:span text:style-name="T11"> </text:span><text:span text:style-name="T10">the</text:span><text:span text:style-name="T11"> </text:span><text:a xlink:type="simple" xlink:href="https://www.kuleuven.be/english/education/leuvenlearninglab/support/toolguide/guidelines-for-safe-use-of-genai-tools" text:style-name="Internet_20_link" text:visited-style-name="Visited_20_Internet_20_Link"><text:span text:style-name="Internet_20_link"><text:span text:style-name="T12">three confidentiality levels of the KU Leuven data classification model</text:span></text:span></text:a><text:span text:style-name="T11"> </text:span><text:span text:style-name="T10">(non-confidential, confidential, strictly confidential). For confidential data you should preferably use </text:span><text:span text:style-name="T11">M365 Copilot Chat with your KU Leuven account</text:span><text:span text:style-name="T10">. If you use another GenAI tool, you must be </text:span><text:span text:style-name="T11">absolutely certain</text:span><text:span text:style-name="T10"> it does </text:span><text:span text:style-name="T11">not store or reuse the data you enter</text:span><text:span text:style-name="T10">. </text:span><text:span text:style-name="T13">Try to avoid entering these data. Do so only if strictly necessary, and only to the extent required. For personal data, work with anonymous or pseudonymized data.</text:span><text:span text:style-name="T10"> Additionally, in case of strictly confidential data this should first be discussed with the teaching staff of the course or your thesis supervisor.</text:span></text:p>
        </text:list-item>
        <text:list-item>
          <text:p text:style-name="P3" loext:marker-style-name="T8"><text:span text:style-name="T9">Copyrighted materials</text:span><text:span text:style-name="T8">: For </text:span><text:span text:style-name="T9">lawfully obtained copyrighted material</text:span><text:span text:style-name="T8"> </text:span><text:span text:style-name="T10">you should preferably use </text:span><text:span text:style-name="T11">M365 Copilot Chat with your KU Leuven account</text:span><text:span text:style-name="T10">. If you use another GenAI tool, you must be </text:span><text:span text:style-name="T11">absolutely certain</text:span><text:span text:style-name="T10"> it does </text:span><text:span text:style-name="T11">not store or reuse the data you enter</text:span><text:span text:style-name="T10">.</text:span></text:p>
        </text:list-item>
        <text:list-item>
          <text:p text:style-name="P3" loext:marker-style-name="T14"><text:span text:style-name="T15">GenAI assistance may not be used for data or topics covered by a </text:span><text:a xlink:type="simple" xlink:href="https://www.kuleuven.be/english/stuvo/student-legal-services/research-with-interaction-with-a-company-or-organisation" text:style-name="Internet_20_link" text:visited-style-name="Visited_20_Internet_20_Link"><text:span text:style-name="Internet_20_link"><text:span text:style-name="T11">Non-Disclosure Agreement (NDA)</text:span></text:span></text:a><text:span text:style-name="T15">. Even in the absence of an NDA, certain information may still need to be treated as confidential—for example, due to regulatory requirements or the risk of significant harm to the university if disclosed.</text:span><text:span text:style-name="T16"> </text:span><text:span text:style-name="T14">In case of doubt, check with your teaching staff or supervisor.</text:span></text:p>
        </text:list-item>
        <text:list-item>
          <text:p text:style-name="P3" loext:marker-style-name="T14"><text:span text:style-name="T16">If your master’s thesis is under </text:span><text:a xlink:type="simple" xlink:href="https://iiw.kuleuven.be/english/students/master-thesis/embargo" text:style-name="Internet_20_link" text:visited-style-name="Visited_20_Internet_20_Link"><text:span text:style-name="Internet_20_link"><text:span text:style-name="T17">embargo</text:span></text:span></text:a><text:span text:style-name="T16">,</text:span><text:span text:style-name="T10"> you should first discuss with your supervisor whether the use of GenAI is permitted.</text:span></text:p>
        </text:list-item>
        <text:list-item>
          <text:p text:style-name="P4" loext:marker-style-name="T8"><text:span text:style-name="T18">Before using a GenAI tool, always consider whether its use is responsible, including from a </text:span><text:a xlink:type="simple" xlink:href="https://www.kuleuven.be/english/genai/sustainable-and-responsible-use-of-genai" text:style-name="Internet_20_link" text:visited-style-name="Visited_20_Internet_20_Link"><text:span text:style-name="Internet_20_link"><text:span text:style-name="T13">sustainability perspective</text:span></text:span></text:a><text:span text:style-name="T13"> </text:span><text:span text:style-name="T18">(e.g. when using GenAI as a search engine, language assistant,…).</text:span></text:p>
        </text:list-item>
        <text:list-item>
          <text:p text:style-name="P4" loext:marker-style-name="T8"><text:span text:style-name="T9">Take a scientific and critical attitude</text:span><text:span text:style-name="T8"> when interacting with </text:span><text:span text:style-name="T19">GenAI assistance </text:span><text:span text:style-name="T8">and interpreting its output, that may not always be correct. </text:span></text:p>
        </text:list-item>
        <text:list-item>
          <text:p text:style-name="P4" loext:marker-style-name="T8"><text:span text:style-name="T8">As a student you are responsible for complying with Article 84 of the Regulations on Education and Examinations: your report or thesis should reflect your own knowledge, understanding and skills. Be aware that plagiarism rules also apply to (work that is the result of) the use of GenAI assistance tools. </text:span><text:span text:style-name="T8"/></text:p>
        </text:list-item>
      </text:list>
      <text:p text:style-name="P5" loext:marker-style-name="T4"><text:span text:style-name="T20">Exam Regulations Article 84</text:span><text:span text:style-name="T4">: “Every conduct individual students display with which they (partially) inhibit or attempt to inhibit a correct judgement of their own knowledge, understanding and/or skills or those of other students, is considered an irregularity which may result in a suitable penalty. A special type of irregularity is plagiarism, i.e. copying the work (ideas, texts, structures, designs, images, plans, codes , ...) of others or prior personal work in an exact or slightly modified way without adequately acknowledging the sources. Every possession of prohibited resources during an examination (see article 65) is considered an irregularity.”</text:span></text:p>
      <text:list text:continue-numbering="true" text:style-name="WWNum1">
        <text:list-item>
          <text:p text:style-name="P6" loext:marker-style-name="T8"><text:bookmark-start text:name="_Hlk181774611"/><text:soft-page-break/><text:span text:style-name="T14">In order to maintain academic integrity and avoid plagiarism,</text:span><text:span text:style-name="T17"> more information about being transparent on the use of GenAI assistance and about correctly citing and referencing GenAI </text:span><text:span text:style-name="T14">can be found on this website</text:span><text:span text:style-name="Internet_20_link"><text:span text:style-name="T21"> for students</text:span></text:span><text:span text:style-name="Internet_20_link"><text:span text:style-name="T22"> </text:span></text:span><text:span text:style-name="T23">(</text:span><text:a xlink:type="simple" xlink:href="https://www.kuleuven.be/onderwijs/student/onderwijstools/artificiele-intelligentie#Transparantie" text:style-name="Internet_20_link" text:visited-style-name="Visited_20_Internet_20_Link"><text:span text:style-name="Internet_20_link"><text:span text:style-name="T23">Dutch</text:span></text:span></text:a><text:span text:style-name="T23">/</text:span><text:a xlink:type="simple" xlink:href="https://www.kuleuven.be/english/education/student/educational-tools/generative-artificial-intelligence#Transparency" text:style-name="Internet_20_link" text:visited-style-name="Visited_20_Internet_20_Link"><text:span text:style-name="Internet_20_link"><text:span text:style-name="T23">English</text:span></text:span></text:a><text:span text:style-name="T23">)</text:span><text:span text:style-name="T14">.</text:span><text:span text:style-name="T8"> </text:span><text:bookmark-end text:name="_Hlk181774611"/></text:p>
        </text:list-item>
        <text:list-item>
          <text:p text:style-name="P6" loext:marker-style-name="T8"><text:span text:style-name="T6">Additional reading: </text:span><text:span text:style-name="T9">KU Leuven guidelines on responsible use of Generative AI tools, and other information </text:span><text:span text:style-name="T8">(</text:span><text:a xlink:type="simple" xlink:href="https://www.kuleuven.be/genai" text:style-name="Internet_20_link" text:visited-style-name="Visited_20_Internet_20_Link"><text:span text:style-name="Internet_20_link"><text:span text:style-name="T8">Dutch</text:span></text:span></text:a><text:span text:style-name="T8">/</text:span><text:a xlink:type="simple" xlink:href="https://www.kuleuven.be/english/genai" text:style-name="Internet_20_link" text:visited-style-name="Visited_20_Internet_20_Link"><text:span text:style-name="Internet_20_link"><text:span text:style-name="T8">English</text:span></text:span></text:a><text:span text:style-name="T8">)</text:span></text:p>
        </text:list-item>
      </text:list>
      <text:p text:style-name="P7" loext:marker-style-name="T8"/>
      <text:p text:style-name="P8" loext:marker-style-name="T24"><text:span text:style-name="T25">A few final words </text:span><text:span text:style-name="T25"/></text:p>
      <text:p text:style-name="P8" loext:marker-style-name="T26"><text:span text:style-name="T26">If you are uncertain whether or not you should declare your use of GenAI tools, we suggest that you discuss this with your instructor or supervisor. It is always safer to declare GenAI use, even when it is not strictly required. However, declaring GenAI use does not entail that its use is allowed; the right column in the table below provides more detailed instructions in this regard (code of conduct). </text:span><text:span text:style-name="T26"/></text:p>
      <text:p text:style-name="P8" loext:marker-style-name="T27"><text:span text:style-name="T28">Moreover, advanced AI tools are evolving rapidly, and their capabilities have expanded significantly in a short period of time. As a result, we do not yet have all the answers about their responsible use.</text:span><text:span text:style-name="T29"> </text:span><text:span text:style-name="T27">Finally, </text:span><text:span text:style-name="ui-provider"><text:span text:style-name="T30">it is important to follow-up on the most recent evolutions in AI technologies, to have an open mind but also to be a bit cautious,</text:span></text:span><text:span text:style-name="T27"> to communicate with instructors, teaching assistants, supervisors and peers, to be as transparent as we can, and to learn together as we move along.</text:span></text:p>
      <text:p text:style-name="P9" loext:marker-style-name="T4"/>
      <text:p text:style-name="P10" loext:marker-style-name="T11"><text:span text:style-name="T11">Student name: </text:span><text:span text:style-name="T12"><text:tab/></text:span><text:span text:style-name="T31">De Wit Gust</text:span><text:span text:style-name="T12"><text:tab/></text:span><text:span text:style-name="T11">Student number: </text:span><text:span text:style-name="T32">r0948039</text:span><text:span text:style-name="T11">………………………………………………..</text:span><text:span text:style-name="T12"><text:tab/></text:span></text:p>
      <text:p text:style-name="P11" loext:marker-style-name="T33"/>
      <text:p text:style-name="P12" loext:marker-style-name="T34"><text:span text:style-name="T33">Please indicate with "X" whether it relates to a course assignment or to the Bachelor’s or Master’s thesis:<text:line-break/></text:span><text:span text:style-name="T34"/></text:p>
      <text:p text:style-name="P13" loext:marker-style-name="T19"/>
      <text:p text:style-name="P14" loext:marker-style-name="T19"><text:span text:style-name="T19">O </text:span><text:span text:style-name="T35">X</text:span><text:span text:style-name="T19"> This form is related to a </text:span><text:span text:style-name="T33">course assignment</text:span><text:span text:style-name="T19">. </text:span></text:p>
      <text:p text:style-name="P15" loext:marker-style-name="T19"><text:span text:style-name="T36"><text:tab/>Course name:</text:span><text:span text:style-name="T19"> <text:tab/></text:span><text:span text:style-name="T37">Computer Algebra for Cryptography</text:span><text:span text:style-name="T19"><text:tab/> <text:s text:c="38"/></text:span><text:span text:style-name="T36">Course number:</text:span><text:span text:style-name="T19"> </text:span><text:span text:style-name="T37">B-KUL-H0E74A</text:span><text:span text:style-name="T19">………………………………………<text:tab/><text:tab/></text:span></text:p>
      <text:p text:style-name="P14" loext:marker-style-name="T19"><text:span text:style-name="T19">This form is related to </text:span><text:span text:style-name="T33">my </text:span><text:span text:style-name="T19">O</text:span><text:span text:style-name="T33"> Bachelor’s or </text:span><text:span text:style-name="T19">O</text:span><text:span text:style-name="T33"> Master’s thesis</text:span><text:span text:style-name="T19">. </text:span></text:p>
      <text:p text:style-name="P16" loext:marker-style-name="T38"><text:span text:style-name="T39">Title Bachelor’s or Master’s thesis</text:span><text:span text:style-name="T38">: </text:span><text:span text:style-name="T12"><text:tab/><text:tab/></text:span><text:span text:style-name="T39"> <text:s text:c="5"/>Supervisor:</text:span><text:span text:style-name="T38"> <text:s/>……………………..…</text:span><text:span text:style-name="T12"><text:tab/></text:span></text:p>
      <text:p text:style-name="P17" loext:marker-style-name="T19"><text:span text:style-name="T19"><text:tab/></text:span><text:span text:style-name="T33">Daily supervisor:</text:span><text:span text:style-name="T19"> <text:tab/><text:tab/></text:span></text:p>
      <text:p text:style-name="P12" loext:marker-style-name="T33"><text:span text:style-name="T33"><text:line-break/>Please indicate with "X":<text:line-break/></text:span><text:span text:style-name="T33"/></text:p>
      <text:p text:style-name="P13" loext:marker-style-name="T19"/>
      <text:p text:style-name="P14" loext:marker-style-name="T40"><text:span text:style-name="T19">O</text:span><text:span text:style-name="T33"> I did not use</text:span><text:span text:style-name="T19"> any GenAI assistance tool.</text:span></text:p>
      <text:p text:style-name="P14" loext:marker-style-name="T19"><text:span text:style-name="T19">O </text:span><text:span text:style-name="T37">X </text:span><text:span text:style-name="T33">I did use</text:span><text:span text:style-name="T19"> GenAI Assistance. In this case </text:span><text:span text:style-name="T36">specify which ones</text:span><text:span text:style-name="T19"> (e.g. ChatGPT, M365 Copilot,...): </text:span><text:span text:style-name="T37">Claude Opus 4.</text:span><text:span text:style-name="T41">7, Claude Sonnet 4.6</text:span></text:p>
      <text:p text:style-name="P18" loext:marker-style-name="T19"/>
      <text:p text:style-name="P19" loext:marker-style-name="T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 loext:marker-style-name="T33"><text:span text:style-name="T42">GenAI assistance used as/for:</text:span><text:span text:style-name="T33"/></text:p>
          </table:table-cell>
          <table:table-cell table:style-name="Table1.A1" office:value-type="string">
            <text:p text:style-name="P21" loext:marker-style-name="T33"><text:span text:style-name="T42">Name of the GenAI tool(s) used. </text:span><text:span text:style-name="T33"/></text:p>
            <text:p text:style-name="P21" loext:marker-style-name="T19"><text:span text:style-name="T43">If helpful, also</text:span><text:span text:style-name="T44"> </text:span><text:span text:style-name="T43">describe in which way you were using GenAI related to what is specified as code of conduct.</text:span></text:p>
          </table:table-cell>
          <table:table-cell table:style-name="Table1.A1" office:value-type="string">
            <text:p text:style-name="P20" loext:marker-style-name="T33"><text:span text:style-name="T42">Code of conduct:</text:span><text:span text:style-name="T33"/></text:p>
          </table:table-cell>
        </table:table-row>
        <table:table-row table:style-name="Table1.1">
          <table:table-cell table:style-name="Table1.A2" office:value-type="string">
            <text:p text:style-name="P22" loext:marker-style-name="T33"/>
          </table:table-cell>
          <table:table-cell table:style-name="Table1.B2" office:value-type="string">
            <text:p text:style-name="P23" loext:marker-style-name="T19"/>
          </table:table-cell>
          <table:table-cell table:style-name="Table1.C2" office:value-type="string">
            <text:p text:style-name="P24" loext:marker-style-name="T39"><text:span text:style-name="T45">For each of the categories below, always take into account the important guidelines and remarks mentioned above (e.g. copyrighted data, sensitive or personal data,…).</text:span><text:span text:style-name="T39"/></text:p>
          </table:table-cell>
        </table:table-row>
        <table:table-row table:style-name="Table1.1">
          <table:table-cell table:style-name="Table1.A3" office:value-type="string">
            <text:p text:style-name="P24" loext:marker-style-name="T33"><text:span text:style-name="T42">As a language assistant for reviewing or improving texts I wrote myself</text:span><text:span text:style-name="T33"/></text:p>
          </table:table-cell>
          <table:table-cell table:style-name="Table1.B3" office:value-type="string">
            <text:p text:style-name="P25" loext:marker-style-name="T19">Claude Opus 4.<text:span text:style-name="T46">7</text:span>, used to improve text written by myself, <text:span text:style-name="T47">shorten it and help with mathematical rigor.</text:span></text:p>
          </table:table-cell>
          <table:table-cell table:style-name="Table1.C3" office:value-type="string">
            <text:p text:style-name="P24" loext:marker-style-name="T38"><text:span text:style-name="T48">This use is similar to using spelling and grammar check tools. In general, you do not have to refer to such kind of GenAI use in the text. </text:span><text:span text:style-name="T38"/></text:p>
            <text:p text:style-name="P24" loext:marker-style-name="T39"><text:span text:style-name="T45">However, be careful: </text:span><text:span text:style-name="T39"/></text:p>
            <text:list text:style-name="WWNum10">
              <text:list-item>
                <text:p text:style-name="P26" loext:marker-style-name="T38"><text:span text:style-name="T48">When using GenAI tools on texts you did not write yourself to improve the text, </text:span><text:span text:style-name="T45">you have to </text:span><text:a xlink:type="simple" xlink:href="https://bib.kuleuven.be/english/training-and-tutorials/citation" text:style-name="Internet_20_link" text:visited-style-name="Visited_20_Internet_20_Link"><text:span text:style-name="Internet_20_link"><text:span text:style-name="T45">refer</text:span></text:span></text:a><text:span text:style-name="T45"> to the original source or author</text:span><text:span text:style-name="T48">, otherwise you are committing </text:span><text:a xlink:type="simple" xlink:href="https://www.kuleuven.be/english/education/plagiarism/index" text:style-name="Internet_20_link" text:visited-style-name="Visited_20_Internet_20_Link"><text:span text:style-name="Internet_20_link"><text:span text:style-name="T48">plagiarism</text:span></text:span></text:a><text:span text:style-name="T48"> and thus an irregularity.</text:span></text:p>
              </text:list-item>
            </text:list>
          </table:table-cell>
        </table:table-row>
        <table:table-row table:style-name="Table1.1">
          <table:table-cell table:style-name="Table1.A4" office:value-type="string">
            <text:p text:style-name="P24" loext:marker-style-name="T33"><text:span text:style-name="T42">As a paraphrasing tool</text:span><text:span text:style-name="T33"/></text:p>
          </table:table-cell>
          <table:table-cell table:style-name="Table1.B4" office:value-type="string">
            <text:p text:style-name="P23" loext:marker-style-name="T19"/>
          </table:table-cell>
          <table:table-cell table:style-name="Table1.C4" office:value-type="string">
            <text:p text:style-name="P27" loext:marker-style-name="T38"><text:span text:style-name="T48">This use is allowed except when it is prohibited by the teacher or the program of study. You may paraphrase your own text or texts by an author other than yourself and take inspiration from what a GenAI tool or another tool suggests (unless it is not allowed). In general, you do not have to refer to such kind of GenAI use or other paraphrasing tools in the text. </text:span><text:span text:style-name="T38"/></text:p>
            <text:p text:style-name="P27" loext:marker-style-name="T39"><text:span text:style-name="T45">However, be careful: </text:span><text:span text:style-name="T39"/></text:p>
            <text:list text:continue-numbering="true" text:style-name="WWNum10">
              <text:list-item>
                <text:p text:style-name="P28" loext:marker-style-name="T38"><text:span text:style-name="T48">If it entails text by an author other than yourself, </text:span><text:span text:style-name="T45">you are not allowed to include that paraphrased text without </text:span><text:a xlink:type="simple" xlink:href="https://bib.kuleuven.be/english/training-and-tutorials/citation" text:style-name="Internet_20_link" text:visited-style-name="Visited_20_Internet_20_Link"><text:span text:style-name="Internet_20_link"><text:span text:style-name="T45">reference</text:span></text:span></text:a><text:span text:style-name="T45"> to the original source or author.</text:span><text:span text:style-name="T48"> Without such reference, you would be committing </text:span><text:a xlink:type="simple" xlink:href="https://www.kuleuven.be/english/education/plagiarism/index" text:style-name="Internet_20_link" text:visited-style-name="Visited_20_Internet_20_Link"><text:span text:style-name="Internet_20_link"><text:span text:style-name="T48">plagiarism</text:span></text:span></text:a><text:span text:style-name="T48"> and thus an irregularity.</text:span></text:p>
              </text:list-item>
            </text:list>
            <text:p text:style-name="P29" loext:marker-style-name="T38"/>
          </table:table-cell>
        </table:table-row>
        <table:table-row table:style-name="Table1.1">
          <table:table-cell table:style-name="Table1.A5" office:value-type="string">
            <text:p text:style-name="P24" loext:marker-style-name="T19"><text:span text:style-name="T42">For translation aid to improve texts I wrote myself or to better understand text from others</text:span><text:span text:style-name="T33"/></text:p>
          </table:table-cell>
          <table:table-cell table:style-name="Table1.B5" office:value-type="string">
            <text:p text:style-name="P25" loext:marker-style-name="T19">Claude Opus 4.<text:span text:style-name="T46">7</text:span>, used to understand texts from others (e.g. papers, slides)</text:p>
          </table:table-cell>
          <table:table-cell table:style-name="Table1.C5" office:value-type="string">
            <text:p text:style-name="P24" loext:marker-style-name="T38"><text:span text:style-name="T48">This use is allowed except when it is prohibited by the teacher or the program of study. It is similar to using translation tools (Google translate, DeepL, …). In general, you do not have to refer to such kind of GenAI use in the text. </text:span><text:span text:style-name="T38"/></text:p>
            <text:p text:style-name="P24" loext:marker-style-name="T39"><text:soft-page-break/><text:span text:style-name="T45">However, be careful: </text:span><text:span text:style-name="T39"/></text:p>
            <text:list text:continue-numbering="true" text:style-name="WWNum10">
              <text:list-item>
                <text:p text:style-name="P26" loext:marker-style-name="T38"><text:span text:style-name="T45">You are not allowed to include that translated text without </text:span><text:a xlink:type="simple" xlink:href="https://bib.kuleuven.be/english/training-and-tutorials/citation" text:style-name="Internet_20_link" text:visited-style-name="Visited_20_Internet_20_Link"><text:span text:style-name="Internet_20_link"><text:span text:style-name="T45">reference</text:span></text:span></text:a><text:span text:style-name="T45"> to the original source or author.</text:span><text:span text:style-name="T48"> Without such reference, you would be committing </text:span><text:a xlink:type="simple" xlink:href="https://www.kuleuven.be/english/education/plagiarism/index" text:style-name="Internet_20_link" text:visited-style-name="Visited_20_Internet_20_Link"><text:span text:style-name="Internet_20_link"><text:span text:style-name="T48">plagiarism</text:span></text:span></text:a><text:span text:style-name="T48"> and thus an irregularity.</text:span></text:p>
              </text:list-item>
            </text:list>
            <text:p text:style-name="P30" loext:marker-style-name="T38"/>
            <text:list text:continue-numbering="true" text:style-name="WWNum10">
              <text:list-item>
                <text:p text:style-name="P26" loext:marker-style-name="T38"><text:span text:style-name="T48">Always check the translated text for correctness and meaning.</text:span><text:span text:style-name="T38"/></text:p>
              </text:list-item>
            </text:list>
          </table:table-cell>
        </table:table-row>
        <table:table-row table:style-name="Table1.1">
          <table:table-cell table:style-name="Table1.A6" office:value-type="string">
            <text:p text:style-name="P31" loext:marker-style-name="T19"><text:span text:style-name="T49">As a search engine to get information on a topic or to search for existing research on the topic</text:span><text:span text:style-name="T36"/></text:p>
          </table:table-cell>
          <table:table-cell table:style-name="Table1.B6" office:value-type="string">
            <text:p text:style-name="P25" loext:marker-style-name="T19">Claude Opus 4.<text:span text:style-name="T50">7</text:span>: To find more information about certain algorithms explained in the course texts</text:p>
          </table:table-cell>
          <table:table-cell table:style-name="Table1.C6" office:value-type="string">
            <text:p text:style-name="P27" loext:marker-style-name="T38"><text:span text:style-name="T48">This use is similar to e.g. a Google search or checking Wikipedia. If you write your own text based on this information, you do not have to refer to the use of GenAI in the text. </text:span><text:span text:style-name="T45">Y</text:span><text:span text:style-name="T42">ou only have to </text:span><text:a xlink:type="simple" xlink:href="https://bib.kuleuven.be/english/training-and-tutorials/citation" text:style-name="Internet_20_link" text:visited-style-name="Visited_20_Internet_20_Link"><text:span text:style-name="Internet_20_link"><text:span text:style-name="T42">refer</text:span></text:span></text:a><text:span text:style-name="T42"> to the existing research and references you have checked and used</text:span><text:span text:style-name="T43"> (without such references you would </text:span><text:span text:style-name="T48">be committing </text:span><text:a xlink:type="simple" xlink:href="https://www.kuleuven.be/english/education/plagiarism/index" text:style-name="Internet_20_link" text:visited-style-name="Visited_20_Internet_20_Link"><text:span text:style-name="Internet_20_link"><text:span text:style-name="T48">plagiarism</text:span></text:span></text:a><text:span text:style-name="T48"> and thus committing an irregularity)</text:span><text:span text:style-name="T43">.</text:span></text:p>
            <text:p text:style-name="P27" loext:marker-style-name="T39"><text:span text:style-name="T45">However, be careful:</text:span><text:span text:style-name="T39"/></text:p>
            <text:list text:continue-numbering="true" text:style-name="WWNum10">
              <text:list-item>
                <text:p text:style-name="P32" loext:marker-style-name="T40"><text:span text:style-name="T38">Be aware that the output of the GenAI tool cannot be guaranteed as a 100% reliable source of information. The output may not be entirely correct and/or be limited due to the databases it uses. Moreover, knowledge evolves and may change over time; therefore, the database of the GenAI tool may not be up to date. Therefore, </text:span><text:span text:style-name="T33">verify the information and do not just copy-paste it</text:span><text:span text:style-name="T19"> as you should understand and critically process everything you are writing. </text:span></text:p>
              </text:list-item>
            </text:list>
          </table:table-cell>
        </table:table-row>
        <table:table-row table:style-name="Table1.1">
          <table:table-cell table:style-name="Table1.A7" office:value-type="string">
            <text:p text:style-name="P24" loext:marker-style-name="T33"><text:span text:style-name="T42">For literature search</text:span><text:span text:style-name="T33"/></text:p>
          </table:table-cell>
          <table:table-cell table:style-name="Table1.B7" office:value-type="string">
            <text:p text:style-name="P33" loext:marker-style-name="T19"/>
          </table:table-cell>
          <table:table-cell table:style-name="Table1.C7" office:value-type="string">
            <text:p text:style-name="P24" loext:marker-style-name="T40"><text:span text:style-name="T43">This use is comparable to e.g. a Google Scholar search. You do not have to refer to such kind of GenAI use; </text:span><text:span text:style-name="T42">you only have to </text:span><text:a xlink:type="simple" xlink:href="https://bib.kuleuven.be/english/training-and-tutorials/citation" text:style-name="Internet_20_link" text:visited-style-name="Visited_20_Internet_20_Link"><text:span text:style-name="Internet_20_link"><text:span text:style-name="T42">refer</text:span></text:span></text:a><text:span text:style-name="T42"> to the literature references you have checked and used</text:span><text:span text:style-name="T43"> (without such references you would </text:span><text:span text:style-name="T48">be committing </text:span><text:a xlink:type="simple" xlink:href="https://www.kuleuven.be/english/education/plagiarism/index" text:style-name="Internet_20_link" text:visited-style-name="Visited_20_Internet_20_Link"><text:span text:style-name="Internet_20_link"><text:span text:style-name="T48">plagiarism</text:span></text:span></text:a><text:span text:style-name="T48"> and thus committing an irregularity)</text:span><text:span text:style-name="T43">..</text:span></text:p>
            <text:p text:style-name="P34" loext:marker-style-name="T51"><text:span text:style-name="T33">However, be careful:</text:span><text:span text:style-name="T51"/></text:p>
            <text:list text:continue-numbering="true" text:style-name="WWNum10">
              <text:list-item>
                <text:p text:style-name="P32" loext:marker-style-name="T40"><text:span text:style-name="T19">Be aware that the search output is restricted to the database the GenAI tool is built on. After this initial search, look for scientific sources and conduct your own analysis of the source documents. </text:span><text:span text:style-name="T33">Interpret, analyse and process </text:span><text:soft-page-break/><text:span text:style-name="T33">the information you obtained; verify it and do not just copy-paste it</text:span><text:span text:style-name="T19"> as you should understand and critically process everything you are writing. </text:span></text:p>
              </text:list-item>
              <text:list-item>
                <text:p text:style-name="P26" loext:marker-style-name="T40"><text:span text:style-name="T43">Be aware that some GenAI tools may </text:span><text:span text:style-name="T42">output </text:span><text:a xlink:type="simple" xlink:href="https://www.kuleuven.be/english/education/leuvenlearninglab/support/toolguide/guidelines-for-safe-use-of-genai-tools" text:style-name="Internet_20_link" text:visited-style-name="Visited_20_Internet_20_Link"><text:span text:style-name="Internet_20_link"><text:span text:style-name="T42">no or wrong references</text:span></text:span></text:a><text:span text:style-name="T43">. As a student you are responsible for further checking and verifying the absence or correctness of references; do not just copy-paste it.</text:span></text:p>
              </text:list-item>
            </text:list>
          </table:table-cell>
        </table:table-row>
        <table:table-row table:style-name="Table1.1">
          <table:table-cell table:style-name="Table1.A8" office:value-type="string">
            <text:p text:style-name="P24" loext:marker-style-name="T33"><text:span text:style-name="T42">For generating programming code </text:span><text:span text:style-name="T33"/></text:p>
          </table:table-cell>
          <table:table-cell table:style-name="Table1.B8" office:value-type="string">
            <text:p text:style-name="P25" loext:marker-style-name="T19">Claude Opus 4.<text:span text:style-name="T46">7</text:span>: used to generate test cases and help with Magma syntax.</text:p>
          </table:table-cell>
          <table:table-cell table:style-name="Table1.C8" office:value-type="string">
            <text:p text:style-name="P24" loext:marker-style-name="T52"><text:span text:style-name="ui-provider"><text:span text:style-name="T12">Use of GenAI for coding is allowed except when it is prohibited by the teacher or the program of study. If used for coding, </text:span></text:span><text:span text:style-name="T48">correctly mention the use of GenAI assistance in accordance with </text:span><text:span text:style-name="T53">the instructions on the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48">.</text:span></text:p>
          </table:table-cell>
        </table:table-row>
        <table:table-row table:style-name="Table1.1">
          <table:table-cell table:style-name="Table1.A9" office:value-type="string">
            <text:p text:style-name="P24" loext:marker-style-name="T33"><text:span text:style-name="T42">For generating new (research) ideas</text:span><text:span text:style-name="T33"/></text:p>
          </table:table-cell>
          <table:table-cell table:style-name="Table1.B9" office:value-type="string">
            <text:p text:style-name="P25" loext:marker-style-name="T19">Claude Opus 4.<text:span text:style-name="T46">7:</text:span> helped exploring ideas. <text:span text:style-name="T54">I</text:span> Explicitly stated that I don’t want it to give me the answer, but to help me towards finding it myself.</text:p>
          </table:table-cell>
          <table:table-cell table:style-name="Table1.C9" office:value-type="string">
            <text:p text:style-name="P24" loext:marker-style-name="T12"><text:span text:style-name="ui-provider"><text:span text:style-name="T12">This use of GenAI is allowed except when it is prohibited by the teacher or the program of study. C</text:span></text:span><text:span text:style-name="T48">orrectly mention the use of GenAI assistance in accordance with </text:span><text:span text:style-name="T53">the instructions on the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48">.</text:span></text:p>
            <text:p text:style-name="P34" loext:marker-style-name="T55"><text:span text:style-name="ui-provider"><text:span text:style-name="T55">Be careful:</text:span></text:span><text:span text:style-name="T55"/></text:p>
            <text:list text:continue-numbering="true" text:style-name="WWNum10">
              <text:list-item>
                <text:p text:style-name="P26" loext:marker-style-name="T19"><text:span text:style-name="T43">Further verify in this case whether the idea is novel or not. It is likely that it is related to existing work. </text:span><text:span text:style-name="T42">If so, that existing work should be correctly </text:span><text:a xlink:type="simple" xlink:href="https://bib.kuleuven.be/english/training-and-tutorials/citation" text:style-name="Internet_20_link" text:visited-style-name="Visited_20_Internet_20_Link"><text:span text:style-name="Internet_20_link"><text:span text:style-name="T42">referenced</text:span></text:span></text:a><text:span text:style-name="T42"> in the text</text:span><text:span text:style-name="T43"> (without such reference you would </text:span><text:span text:style-name="T48">be committing </text:span><text:a xlink:type="simple" xlink:href="https://www.kuleuven.be/english/education/plagiarism/index" text:style-name="Internet_20_link" text:visited-style-name="Visited_20_Internet_20_Link"><text:span text:style-name="Internet_20_link"><text:span text:style-name="T48">plagiarism</text:span></text:span></text:a><text:span text:style-name="T48"> and thus committing an irregularity)</text:span><text:span text:style-name="T43">.</text:span></text:p>
              </text:list-item>
              <text:list-item>
                <text:p text:style-name="P35" loext:marker-style-name="T19"/>
              </text:list-item>
            </text:list>
          </table:table-cell>
        </table:table-row>
        <table:table-row table:style-name="Table1.1">
          <table:table-cell table:style-name="Table1.A10" office:value-type="string">
            <text:p text:style-name="P24" loext:marker-style-name="T33"><text:span text:style-name="T42">For generating synthetic data</text:span><text:span text:style-name="T33"/></text:p>
          </table:table-cell>
          <table:table-cell table:style-name="Table1.B10" office:value-type="string">
            <text:p text:style-name="P36" loext:marker-style-name="T19"/>
          </table:table-cell>
          <table:table-cell table:style-name="Table1.C10" office:value-type="string">
            <text:p text:style-name="P24" loext:marker-style-name="T38"><text:span text:style-name="ui-provider"><text:span text:style-name="T12">Use of GenAI for generating synthetic data is allowed, </text:span></text:span><text:span text:style-name="ui-provider"><text:span text:style-name="T55">provided that it is methodologically and ethically justifiable</text:span></text:span><text:span text:style-name="ui-provider"><text:span text:style-name="T12">, except when it is prohibited by the teacher or the program of study. Always </text:span></text:span><text:span text:style-name="T48">correctly mention the use of GenAI assistance in accordance with </text:span><text:span text:style-name="T53">the instructions on the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48">.</text:span></text:p>
            <text:p text:style-name="P24" loext:marker-style-name="T56"><text:span text:style-name="T57">Be careful:</text:span><text:span text:style-name="T56"/></text:p>
            <text:list text:continue-numbering="true" text:style-name="WWNum10">
              <text:list-item>
                <text:p text:style-name="P26" loext:marker-style-name="T33"><text:span text:style-name="T43">Always </text:span><text:span text:style-name="T42">carefully evaluate</text:span><text:span text:style-name="T43"> the generated synthetic data for quality and possible bias since the output is highly dependent on the quality of the data on which the models are trained.</text:span></text:p>
              </text:list-item>
            </text:list>
          </table:table-cell>
        </table:table-row>
        <text:soft-page-break/>
        <table:table-row table:style-name="Table1.1">
          <table:table-cell table:style-name="Table1.A11" office:value-type="string">
            <text:p text:style-name="P24" loext:marker-style-name="T33"><text:span text:style-name="T42">For generating blocks of text</text:span><text:span text:style-name="T33"/></text:p>
            <text:p text:style-name="P24" loext:marker-style-name="T33"><text:span text:style-name="T42">(other than the allowed use without referencing mentioned above)</text:span><text:span text:style-name="T33"/></text:p>
          </table:table-cell>
          <table:table-cell table:style-name="Table1.B11" office:value-type="string">
            <text:p text:style-name="P23" loext:marker-style-name="T19"/>
          </table:table-cell>
          <table:table-cell table:style-name="Table1.C11" office:value-type="string">
            <text:p text:style-name="P24" loext:marker-style-name="T19"><text:span text:style-name="T43">According to Article 84 of the Regulations on Education and Examinations your text should allow to correctly and properly assess your own knowledge, understanding and skills.</text:span><text:span text:style-name="T42"> Therefore, inserting blocks of text without quotes and a reference to GenAI assistance in your work is not allowed.</text:span></text:p>
            <text:p text:style-name="P24" loext:marker-style-name="T33"><text:span text:style-name="T42">Be careful:</text:span><text:span text:style-name="T33"/></text:p>
            <text:list text:continue-numbering="true" text:style-name="WWNum10">
              <text:list-item>
                <text:p text:style-name="P26" loext:marker-style-name="T19"><text:span text:style-name="T43">If it is really needed to insert a block of text from a GenAI tool, for instance because of the nature of your assignment, mention it as a citation by using quotes and </text:span><text:span text:style-name="T48">correctly mention the use of GenAI assistance in accordance with </text:span><text:span text:style-name="T53">the instructions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43">. </text:span></text:p>
              </text:list-item>
              <text:list-item>
                <text:p text:style-name="P26" loext:marker-style-name="T19"><text:span text:style-name="T43">However, in general, such GenAI use should be kept to an </text:span><text:span text:style-name="T42">absolute minimum</text:span><text:span text:style-name="T43">; you should always check the original sources. </text:span></text:p>
              </text:list-item>
            </text:list>
          </table:table-cell>
        </table:table-row>
        <table:table-row table:style-name="Table1.1">
          <table:table-cell table:style-name="Table1.A12" office:value-type="string">
            <text:p text:style-name="P24" loext:marker-style-name="T33"><text:span text:style-name="T42">For generating visuals, video or audio</text:span><text:span text:style-name="T33"/></text:p>
          </table:table-cell>
          <table:table-cell table:style-name="Table1.B12" office:value-type="string">
            <text:p text:style-name="P23" loext:marker-style-name="T19"/>
          </table:table-cell>
          <table:table-cell table:style-name="Table1.C12" office:value-type="string">
            <text:p text:style-name="P34" loext:marker-style-name="T12"><text:span text:style-name="ui-provider"><text:span text:style-name="T12">Use of GenAI for generating visuals,</text:span></text:span><text:span text:style-name="ui-provider"> audio or video</text:span><text:span text:style-name="ui-provider"><text:span text:style-name="T12"> is allowed except when it is prohibited by the teacher or the program of study. </text:span></text:span></text:p>
            <text:p text:style-name="P34" loext:marker-style-name="T55"><text:span text:style-name="ui-provider"><text:span text:style-name="T55">Be careful:</text:span></text:span><text:span text:style-name="T55"/></text:p>
            <text:list text:continue-numbering="true" text:style-name="WWNum10">
              <text:list-item>
                <text:p text:style-name="P32" loext:marker-style-name="T53"><text:span text:style-name="ui-provider"><text:span text:style-name="T12">If used, r</text:span></text:span><text:span text:style-name="T53">efer to GenAI for visuals according to the usual referencing style, following the instructions on the </text:span><text:a xlink:type="simple" xlink:href="https://bib.kuleuven.be/english/training-and-tutorials/citation/refering-to-genai" text:style-name="Internet_20_link" text:visited-style-name="Visited_20_Internet_20_Link"><text:span text:style-name="Internet_20_link"><text:span text:style-name="T12">page on referencing GenAI</text:span></text:span></text:a><text:span text:style-name="T53">. </text:span></text:p>
              </text:list-item>
              <text:list-item>
                <text:p text:style-name="P32" loext:marker-style-name="T53"><text:span text:style-name="T53">If you work with existing visuals, audio or video,</text:span><text:span text:style-name="T33"> that existing work should be correctly </text:span><text:a xlink:type="simple" xlink:href="https://bib.kuleuven.be/english/training-and-tutorials/citation" text:style-name="Internet_20_link" text:visited-style-name="Visited_20_Internet_20_Link"><text:span text:style-name="Internet_20_link"><text:span text:style-name="T33">referenced</text:span></text:span></text:a><text:span text:style-name="T33"> in the text</text:span><text:span text:style-name="T19"> (without such reference you would </text:span><text:span text:style-name="T38">be committing </text:span><text:a xlink:type="simple" xlink:href="https://www.kuleuven.be/english/education/plagiarism/index" text:style-name="Internet_20_link" text:visited-style-name="Visited_20_Internet_20_Link"><text:span text:style-name="Internet_20_link"><text:span text:style-name="T38">plagiarism</text:span></text:span></text:a><text:span text:style-name="T38"> and thus an irregularity)</text:span><text:span text:style-name="T19">.</text:span><text:span text:style-name="T53"> </text:span></text:p>
              </text:list-item>
              <text:list-item>
                <text:p text:style-name="P32" loext:marker-style-name="T53"><text:span text:style-name="T53">Explain the usage in the methods section (if there is one) and optionally attach (or link to) the prompts with the full output (or history).</text:span><text:span text:style-name="T53"/></text:p>
              </text:list-item>
            </text:list>
          </table:table-cell>
        </table:table-row>
        <table:table-row table:style-name="Table1.1">
          <table:table-cell table:style-name="Table1.A13" office:value-type="string">
            <text:p text:style-name="P24" loext:marker-style-name="T33"><text:span text:style-name="T42">Other use (specify here; this may also include a combination of types of use mentioned above):</text:span><text:span text:style-name="T33"/></text:p>
          </table:table-cell>
          <table:table-cell table:style-name="Table1.B13" office:value-type="string">
            <text:p text:style-name="P23" loext:marker-style-name="T19"/>
          </table:table-cell>
          <table:table-cell table:style-name="Table1.C13" office:value-type="string">
            <text:p text:style-name="P24" loext:marker-style-name="T19"><text:span text:style-name="T43">To make sure other use of GenAI is allowed within the course or thesis, and if so, the conditions that may apply, contact the teaching staff of the course or the supervisor of the thesis </text:span><text:span text:style-name="T42">beforehand</text:span><text:span text:style-name="T43"> and explain the intended GenAI use. <text:s/>Also inform the programme director. </text:span></text:p>
            <text:p text:style-name="P24" loext:marker-style-name="T19"><text:soft-page-break/><text:span text:style-name="T43">Motivate how you would comply with Article 84 of the exam regulations. Explain the use and the added value of the AI tool you consider to use and how it is in accordance with the assignment or thesis and the </text:span><text:a xlink:type="simple" xlink:href="https://www.kuleuven.be/english/genai" text:style-name="Internet_20_link" text:visited-style-name="Visited_20_Internet_20_Link"><text:span text:style-name="Internet_20_link"><text:span text:style-name="T12">KU Leuven guidelines on responsible use of Generative AI tools</text:span></text:span></text:a><text:span text:style-name="T43">. </text:span></text:p>
            <text:p text:style-name="P24" loext:marker-style-name="T19"><text:span text:style-name="T43">Depending on the kind of GenAI use, it may be needed to properly reference it in the text, </text:span><text:span text:style-name="T53">in accordance with the instructions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43">.</text:span></text:p>
          </table:table-cell>
        </table:table-row>
      </table:table>
      <text:p text:style-name="P18" loext:marker-style-name="T19"><text:bookmark-end text:name="_Hlk133403818"/></text:p>
      <text:p text:style-name="P18" loext:marker-style-name="T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nl" fo:country="BE" style:letter-kerning="fals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4.501cm" style:writing-mode="page"/>
      <style:text-properties style:use-window-font-color="true" loext:opacity="0%" style:font-name="Calibri"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pf0"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BE"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Adwaita Sans" style:font-family-asian="'Adwaita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Adwaita Sans" style:font-family-asian="'Adwaita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ui-provid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cf01" style:family="text" style:parent-style-name="Default_20_Paragraph_20_Fon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1pt" style:font-name-asian="Times New Roman1" style:font-family-asian="'Times New Roman'" style:font-family-generic-asian="system" style:font-pitch-asian="variable" style:font-size-asian="11pt" style:font-name-complex="Calibri2"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size-asian="11pt"/>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Times New Roman1" style:font-family-asian="'Times New Roman'" style:font-family-generic-asian="system" style:font-pitch-asian="variable" style:font-size-asian="11pt" style:font-name-complex="Calibri2"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Times New Roman1" style:font-family-asian="'Times New Roman'" style:font-family-generic-asian="system" style:font-pitch-asian="variable" style:font-size-asian="11pt" style:font-name-complex="Calibri2"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language="en" fo:country="US"/>
    </style:style>
    <style:style style:name="ListLabel_20_128" style:display-name="ListLabel 128" style:family="text">
      <style:text-properties style:font-name="Calibri1" fo:font-family="Calibri" style:font-family-generic="swiss" style:font-pitch="variable" fo:language="en" fo:country="US" fo:font-weight="bold" style:font-weight-asian="bold" style:font-name-complex="Calibri2" style:font-family-complex="Calibri" style:font-family-generic-complex="system" style:font-pitch-complex="variable" style:font-weight-complex="bold"/>
    </style:style>
    <style:style style:name="ListLabel_20_129" style:display-name="ListLabel 129" style:family="text">
      <style:text-properties style:font-name="Calibri1" fo:font-family="Calibri" style:font-family-generic="swiss" style:font-pitch="variable" fo:language="en" fo:country="GB" fo:font-weight="bold" style:font-weight-asian="bold" style:font-name-complex="Calibri2" style:font-family-complex="Calibri" style:font-family-generic-complex="system" style:font-pitch-complex="variable"/>
    </style:style>
    <style:style style:name="ListLabel_20_130" style:display-name="ListLabel 130" style:family="text">
      <style:text-properties style:font-name="Calibri1" fo:font-family="Calibri" style:font-family-generic="swiss" style:font-pitch="variable" fo:font-weight="bold" style:font-weight-asian="bold" style:font-name-complex="Calibri2" style:font-family-complex="Calibri" style:font-family-generic-complex="system" style:font-pitch-complex="variable" style:font-weight-complex="bold"/>
    </style:style>
    <style:style style:name="ListLabel_20_131" style:display-name="ListLabel 131" style:family="text">
      <style:text-properties style:font-name="Calibri1" fo:font-family="Calibri" style:font-family-generic="swiss" style:font-pitch="variable" fo:language="en" fo:country="GB"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32" style:display-name="ListLabel 132" style:family="text">
      <style:text-properties style:font-name="Calibri1" fo:font-family="Calibri" style:font-family-generic="swiss" style:font-pitch="variable" fo:language="en" fo:country="GB" style:font-name-complex="Calibri2" style:font-family-complex="Calibri" style:font-family-generic-complex="system" style:font-pitch-complex="variable"/>
    </style:style>
    <style:style style:name="ListLabel_20_133" style:display-name="ListLabel 133" style:family="text">
      <style:text-properties style:font-name="Calibri1" fo:font-family="Calibri" style:font-family-generic="swiss" style:font-pitch="variable" fo:language="en" fo:country="US" fo:font-weight="bold" style:font-name-asian="Times New Roman1" style:font-family-asian="'Times New Roman'" style:font-family-generic-asian="system" style:font-pitch-asian="variable" style:language-asian="nl" style:country-asian="BE" style:font-weight-asian="bold" style:font-name-complex="Calibri2" style:font-family-complex="Calibri" style:font-family-generic-complex="system" style:font-pitch-complex="variable" style:font-weight-complex="bold"/>
    </style:style>
    <style:style style:name="ListLabel_20_134" style:display-name="ListLabel 134" style:family="text">
      <style:text-properties style:font-name="Calibri1" fo:font-family="Calibri" style:font-family-generic="swiss" style:font-pitch="variable" fo:language="en" fo:country="US" style:font-name-asian="Times New Roman1" style:font-family-asian="'Times New Roman'" style:font-family-generic-asian="system" style:font-pitch-asian="variable" style:language-asian="nl" style:country-asian="BE" style:font-name-complex="Calibri2" style:font-family-complex="Calibri" style:font-family-generic-complex="system" style:font-pitch-complex="variable"/>
    </style:style>
    <style:style style:name="ListLabel_20_135" style:display-name="ListLabel 135" style:family="text">
      <style:text-properties style:font-name="Calibri1" fo:font-family="Calibri" style:font-family-generic="swiss" style:font-pitch="variable" fo:language="en" fo:country="GB" fo:font-weight="bold" style:font-name-asian="Times New Roman1" style:font-family-asian="'Times New Roman'" style:font-family-generic-asian="system" style:font-pitch-asian="variable" style:language-asian="nl" style:country-asian="BE" style:font-weight-asian="bold" style:font-name-complex="Calibri2" style:font-family-complex="Calibri" style:font-family-generic-complex="system" style:font-pitch-complex="variable"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635cm" fo:margin-left="2.529cm"/>
        </style:list-level-properties>
        <style:text-properties fo:font-family="'Courier New'"/>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99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69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39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09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79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4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19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8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language="en" fo:country="US"/>
    </style:style>
    <style:style style:name="MT2" style:family="text">
      <style:text-properties fo:language="en" fo:country="US" fo:font-style="italic" style:font-style-asian="italic" style:font-style-complex="italic"/>
    </style:style>
    <style:page-layout style:name="Mpm1">
      <style:page-layout-properties fo:page-width="29.7cm" fo:page-height="21.001cm" style:num-format="1" style:print-orientation="landscape" fo:margin-top="1.27cm" fo:margin-bottom="2.372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8</text:page-number></text:span></text:p>
        <text:p text:style-name="Footer" loext:marker-style-name="MT2"><text:span text:style-name="MT2">GenAI code of conduct and transparency statement for students 2025-2026</text:span><text:span text:style-name="MT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teven Huyghe;Roel De Meu</meta:initial-creator>
    <meta:editing-cycles>52</meta:editing-cycles>
    <meta:creation-date>2025-05-12T15:46:00</meta:creation-date>
    <dc:date>2026-05-19T15:30:18.306869095</dc:date>
    <meta:editing-duration>PT13M52S</meta:editing-duration>
    <meta:generator>LibreOffice/25.8.6.2$Linux_X86_64 LibreOffice_project/580$Build-2</meta:generator>
    <meta:document-statistic meta:table-count="1" meta:image-count="0" meta:object-count="0" meta:page-count="8" meta:paragraph-count="88" meta:word-count="2290" meta:character-count="13771" meta:non-whitespace-character-count="11504"/>
    <meta:user-defined meta:name="AppVersion">16.0000</meta:user-defined>
    <meta:user-defined meta:name="ComplianceAssetId"/>
    <meta:user-defined meta:name="ContentTypeId">0x010100C716486488F8A3489750D63DDC4FAC04</meta:user-defined>
    <meta:user-defined meta:name="TemplateUrl"/>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 xlink:href=""/>
  </office:meta>
</office:document-meta>
</file>